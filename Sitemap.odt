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  <style:text-properties fo:language="en" fo:country="US"/>
    </style:style>
    <style:style style:name="P2" style:parent-style-name="Standaard" style:family="paragraph">
      <style:text-properties fo:language="en" fo:country="US"/>
    </style:style>
    <style:style style:name="P3" style:parent-style-name="Kop1" style:family="paragraph">
      <style:text-properties fo:language="en" fo:country="US"/>
    </style:style>
    <style:style style:name="P4" style:parent-style-name="Lijstalinea" style:list-style-name="LFO1" style:family="paragraph"/>
    <style:style style:name="P5" style:parent-style-name="Lijstalinea" style:list-style-name="LFO1" style:family="paragraph">
      <style:text-properties fo:language="en" fo:country="US"/>
    </style:style>
    <style:style style:name="P6" style:parent-style-name="Lijstalinea" style:list-style-name="LFO1" style:family="paragraph">
      <style:text-properties fo:language="en" fo:country="US"/>
    </style:style>
    <style:style style:name="P7" style:parent-style-name="Kop1" style:family="paragraph">
      <style:text-properties fo:language="en" fo:country="US"/>
    </style:style>
    <style:style style:name="P8" style:parent-style-name="Lijstalinea" style:list-style-name="LFO1" style:family="paragraph">
      <style:text-properties fo:language="en" fo:country="US"/>
    </style:style>
    <style:style style:name="P9" style:parent-style-name="Lijstalinea" style:list-style-name="LFO1" style:family="paragraph">
      <style:text-properties fo:language="en" fo:country="US"/>
    </style:style>
    <style:style style:name="P10" style:parent-style-name="Lijstalinea" style:list-style-name="LFO1" style:family="paragraph">
      <style:text-properties fo:language="en" fo:country="US"/>
    </style:style>
    <style:style style:name="P11" style:parent-style-name="Lijstalinea" style:list-style-name="LFO1" style:family="paragraph">
      <style:text-properties fo:language="en" fo:country="US"/>
    </style:style>
    <style:style style:name="P12" style:parent-style-name="Lijstalinea" style:list-style-name="LFO1" style:family="paragraph">
      <style:text-properties fo:language="en" fo:country="US"/>
    </style:style>
    <style:style style:name="P13" style:parent-style-name="Lijstalinea" style:list-style-name="LFO1" style:family="paragraph">
      <style:text-properties fo:language="en" fo:country="US"/>
    </style:style>
    <style:style style:name="P14" style:parent-style-name="Lijstalinea" style:list-style-name="LFO1" style:family="paragraph">
      <style:text-properties fo:language="en" fo:country="US"/>
    </style:style>
    <style:style style:name="P15" style:parent-style-name="Lijstalinea" style:list-style-name="LFO1" style:family="paragraph">
      <style:text-properties fo:language="en" fo:country="US"/>
    </style:style>
    <style:style style:name="P16" style:parent-style-name="Lijstalinea" style:list-style-name="LFO1" style:family="paragraph">
      <style:text-properties fo:language="en" fo:country="US"/>
    </style:style>
    <style:style style:name="P17" style:parent-style-name="Standaard" style:family="paragraph">
      <style:text-properties fo:language="en" fo:country="US"/>
    </style:style>
  </office:automatic-styles>
  <office:body>
    <office:text text:use-soft-page-breaks="true">
      <text:p text:style-name="P1">Sitemap</text:p>
      <text:p text:style-name="P2"/>
      <text:h text:style-name="P3" text:outline-level="1">Dashboard</text:h>
      <text:list text:style-name="LFO1" text:continue-numbering="true">
        <text:list-item>
          <text:p text:style-name="P4">Navigatiebalk met: Dashboard, Overzicht Slaaptracker en Instellingen</text:p>
        </text:list-item>
        <text:list-item>
          <text:p text:style-name="P5">Welkomtekst<text:s/>+ username</text:p>
        </text:list-item>
        <text:list-item>
          <text:p text:style-name="P6">Slaaptracker</text:p>
        </text:list-item>
      </text:list>
      <text:h text:style-name="P7" text:outline-level="1">Slaap toevoegen</text:h>
      <text:list text:style-name="LFO1" text:continue-numbering="true">
        <text:list-item>
          <text:p text:style-name="P8">Slaaptrackertekst</text:p>
        </text:list-item>
        <text:list-item>
          <text:p text:style-name="P9">Datum</text:p>
        </text:list-item>
        <text:list-item>
          <text:p text:style-name="P10">Begintijd</text:p>
        </text:list-item>
        <text:list-item>
          <text:p text:style-name="P11">Eindtijd</text:p>
        </text:list-item>
        <text:list-item>
          <text:p text:style-name="P12">Notitie</text:p>
        </text:list-item>
        <text:list-item>
          <text:p text:style-name="P13">Opslaan</text:p>
        </text:list-item>
        <text:list-item>
          <text:p text:style-name="P14">Alle registraties</text:p>
        </text:list-item>
      </text:list>
      <text:h text:style-name="Kop4" text:outline-level="4">Datamodel</text:h>
      <text:p text:style-name="Standaard">Het model voor het toevoegen van je slaap<text:s/>en van het overzicht van je registraties<text:s/>zal er zo uit zien: {</text:p>
      <text:p text:style-name="Standaard">Datum: "2026-06-02",<text:line-break/>begintijd: "22:00",<text:line-break/>eindtijd:<text:s/>"07:00",<text:line-break/>notitie: "Goed geslapen"</text:p>
      <text:p text:style-name="Standaard">}</text:p>
      <text:h text:style-name="Kop1" text:outline-level="1">Overzicht</text:h>
      <text:list text:style-name="LFO1" text:continue-numbering="true">
        <text:list-item>
          <text:p text:style-name="P15">Lijst met registraties<text:s/></text:p>
        </text:list-item>
        <text:list-item>
          <text:p text:style-name="P16">Reset knop</text:p>
        </text:list-item>
      </text:list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ucas de Vette</meta:initial-creator>
    <dc:creator>lucas de vette</dc:creator>
    <meta:creation-date>2026-06-02T09:48:00Z</meta:creation-date>
    <dc:date>2026-06-08T11:53:00Z</dc:date>
    <meta:template xlink:href="Normal" xlink:type="simple"/>
    <meta:editing-cycles>2</meta:editing-cycles>
    <meta:editing-duration>PT1620S</meta:editing-duration>
    <meta:document-statistic meta:page-count="1" meta:paragraph-count="1" meta:word-count="71" meta:character-count="464" meta:row-count="3" meta:non-whitespace-character-count="394"/>
  </office:meta>
</office:document-meta>
</file>